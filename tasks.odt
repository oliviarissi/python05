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084in" table:align="left"/>
    </style:style>
    <style:style style:name="Table1.A" style:family="table-column">
      <style:table-column-properties style:column-width="0.6819in"/>
    </style:style>
    <style:style style:name="Table1.B" style:family="table-column">
      <style:table-column-properties style:column-width="2.402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eat idea. Stripping the story out of each exercise makes the tasks <text:span text:style-name="Strong_20_Emphasis">much clearer</text:span>. Below are the <text:span text:style-name="Strong_20_Emphasis">plain technical requirements</text:span> for each exercise.</text:p>
      <text:p text:style-name="Horizontal_20_Line"/>
      <text:h text:style-name="Heading_20_1" text:outline-level="1">Exercise 0 — Plain Requirements</text:h>
      <text:p text:style-name="Text_20_body">Directory:</text:p>
      <text:section text:style-name="Sect1" text:name="code-block-viewer">
        <text:p text:style-name="P1">ex0/</text:p>
        <text:p text:style-name="Preformatted_20_Text">stream_processor.py</text:p>
      </text:section>
      <text:h text:style-name="Heading_20_2" text:outline-level="2">Goal</text:h>
      <text:p text:style-name="Text_20_body">Demonstrate <text:span text:style-name="Strong_20_Emphasis">inheritance, abstract classes, and method overriding</text:span>.</text:p>
      <text:p text:style-name="Horizontal_20_Line"/>
      <text:h text:style-name="Heading_20_2" text:outline-level="2">Step 1 — Create an Abstract Base Class</text:h>
      <text:p text:style-name="Text_20_body">Create a class:</text:p>
      <text:section text:style-name="Sect1" text:name="Section1">
        <text:p text:style-name="P1"><text:bookmark text:name="code-block-viewer"/>DataProcessor</text:p>
      </text:section>
      <text:p text:style-name="Text_20_body">It must inherit from:</text:p>
      <text:section text:style-name="Sect1" text:name="Section2">
        <text:p text:style-name="P1"><text:bookmark text:name="code-block-viewer Copy 1"/>ABC</text:p>
      </text:section>
      <text:p text:style-name="Text_20_body">Import:</text:p>
      <text:section text:style-name="Sect1" text:name="Section3">
        <text:p text:style-name="P1"><text:bookmark text:name="code-block-viewer Copy 2"/>from abc import ABC, abstractmethod</text:p>
      </text:section>
      <text:p text:style-name="Horizontal_20_Line"/>
      <text:h text:style-name="Heading_20_2" text:outline-level="2">Step 2 — Required Methods in Base Class</text:h>
      <text:h text:style-name="Heading_20_3" text:outline-level="3">Abstract methods</text:h>
      <text:p text:style-name="Text_20_body">These must exist but <text:span text:style-name="Strong_20_Emphasis">have no implementation</text:span>:</text:p>
      <text:section text:style-name="Sect1" text:name="Section4">
        <text:p text:style-name="P1"><text:bookmark text:name="code-block-viewer Copy 3"/>process(self, data: Any) -&gt; str</text:p>
        <text:p text:style-name="Preformatted_20_Text">validate(self, data: Any) -&gt; bool</text:p>
      </text:section>
      <text:p text:style-name="Horizontal_20_Line"/>
      <text:h text:style-name="Heading_20_3" text:outline-level="3">Concrete method (default implementation)</text:h>
      <text:section text:style-name="Sect1" text:name="Section5">
        <text:p text:style-name="P1"><text:bookmark text:name="code-block-viewer Copy 4"/>format_output(self, result: str) -&gt; str</text:p>
      </text:section>
      <text:p text:style-name="Text_20_body">This method should return a formatted string.</text:p>
      <text:p text:style-name="Text_20_body">Example idea:</text:p>
      <text:section text:style-name="Sect1" text:name="Section6">
        <text:p text:style-name="P1"><text:bookmark text:name="code-block-viewer Copy 5"/>return f"Output: {result}"</text:p>
      </text:section>
      <text:p text:style-name="Text_20_body">Subclasses <text:span text:style-name="Strong_20_Emphasis">may override it</text:span>, but they don't have to.</text:p>
      <text:p text:style-name="Horizontal_20_Line"/>
      <text:h text:style-name="Heading_20_2" text:outline-level="2">Step 3 — Create Three Subclasses</text:h>
      <text:p text:style-name="Text_20_body">Create classes that inherit from <text:span text:style-name="Source_20_Text">DataProcessor</text:span>.</text:p>
      <text:section text:style-name="Sect1" text:name="Section7">
        <text:p text:style-name="P1"><text:bookmark text:name="code-block-viewer Copy 6"/><text:soft-page-break/>NumericProcessor</text:p>
        <text:p text:style-name="Preformatted_20_Text">TextProcessor</text:p>
        <text:p text:style-name="Preformatted_20_Text">LogProcessor</text:p>
      </text:section>
      <text:p text:style-name="Text_20_body">No constructor parameters are required.</text:p>
      <text:p text:style-name="Horizontal_20_Line"/>
      <text:h text:style-name="Heading_20_2" text:outline-level="2">Step 4 — Override Methods</text:h>
      <text:p text:style-name="Text_20_body">Each subclass must implement:</text:p>
      <text:section text:style-name="Sect1" text:name="Section8">
        <text:p text:style-name="P1"><text:bookmark text:name="code-block-viewer Copy 7"/>process()</text:p>
        <text:p text:style-name="Preformatted_20_Text">validate()</text:p>
      </text:section>
      <text:p text:style-name="Text_20_body">Example behaviors:</text:p>
      <text:h text:style-name="Heading_20_3" text:outline-level="3">NumericProcessor</text:h>
      <text:p text:style-name="Text_20_body">Accepts numeric lists.</text:p>
      <text:p text:style-name="Text_20_body">Possible behavior:</text:p>
      <text:section text:style-name="Sect1" text:name="Section9">
        <text:p text:style-name="P1"><text:bookmark text:name="code-block-viewer Copy 8"/>validate → data is list of numbers</text:p>
        <text:p text:style-name="Preformatted_20_Text">process → count numbers, compute sum, average</text:p>
      </text:section>
      <text:p text:style-name="Horizontal_20_Line"/>
      <text:h text:style-name="Heading_20_3" text:outline-level="3">TextProcessor</text:h>
      <text:p text:style-name="Text_20_body">Accepts strings.</text:p>
      <text:p text:style-name="Text_20_body">Possible behavior:</text:p>
      <text:section text:style-name="Sect1" text:name="Section10">
        <text:p text:style-name="P1"><text:bookmark text:name="code-block-viewer Copy 9"/>validate → data is str</text:p>
        <text:p text:style-name="Preformatted_20_Text">process → count characters and words</text:p>
      </text:section>
      <text:p text:style-name="Horizontal_20_Line"/>
      <text:h text:style-name="Heading_20_3" text:outline-level="3">LogProcessor</text:h>
      <text:p text:style-name="Text_20_body">Accepts log messages.</text:p>
      <text:p text:style-name="Text_20_body">Possible behavior:</text:p>
      <text:section text:style-name="Sect1" text:name="Section11">
        <text:p text:style-name="P1"><text:bookmark text:name="code-block-viewer Copy 10"/>validate → data is str</text:p>
        <text:p text:style-name="Preformatted_20_Text">process → detect log level (INFO, ERROR, etc.)</text:p>
      </text:section>
      <text:p text:style-name="Horizontal_20_Line"/>
      <text:h text:style-name="Heading_20_2" text:outline-level="2">Step 5 — Demonstrate Polymorphism</text:h>
      <text:p text:style-name="Text_20_body">Create a list of processors:</text:p>
      <text:section text:style-name="Sect1" text:name="Section12">
        <text:p text:style-name="P1"><text:bookmark text:name="code-block-viewer Copy 11"/>processors = [</text:p>
        <text:p text:style-name="Preformatted_20_Text"><text:s text:c="4"/>NumericProcessor(),</text:p>
        <text:p text:style-name="Preformatted_20_Text"><text:s text:c="4"/>TextProcessor(),</text:p>
        <text:p text:style-name="Preformatted_20_Text"><text:s text:c="4"/>LogProcessor()</text:p>
        <text:p text:style-name="Preformatted_20_Text">]</text:p>
      </text:section>
      <text:p text:style-name="Text_20_body">Then call the <text:span text:style-name="Strong_20_Emphasis">same method</text:span> on each:</text:p>
      <text:section text:style-name="Sect1" text:name="Section13">
        <text:p text:style-name="P1"><text:bookmark text:name="code-block-viewer Copy 12"/>for processor in processors:</text:p>
        <text:p text:style-name="Preformatted_20_Text"><text:s text:c="4"/>processor.process(data)</text:p>
      </text:section>
      <text:p text:style-name="Text_20_body">This shows <text:span text:style-name="Strong_20_Emphasis">same interface, different behavior</text:span>.</text:p>
      <text:p text:style-name="Horizontal_20_Line"><text:soft-page-break/></text:p>
      <text:h text:style-name="Heading_20_1" text:outline-level="1">Exercise 1 — Plain Requirements</text:h>
      <text:p text:style-name="Text_20_body">Directory:</text:p>
      <text:section text:style-name="Sect1" text:name="Section14">
        <text:p text:style-name="P1"><text:bookmark text:name="code-block-viewer Copy 13"/>ex1/</text:p>
        <text:p text:style-name="Preformatted_20_Text">data_stream.py</text:p>
      </text:section>
      <text:p text:style-name="Horizontal_20_Line"/>
      <text:h text:style-name="Heading_20_2" text:outline-level="2">Goal</text:h>
      <text:p text:style-name="Text_20_body">Demonstrate <text:span text:style-name="Strong_20_Emphasis">polymorphism with multiple stream types</text:span> and <text:span text:style-name="Strong_20_Emphasis">batch processing</text:span>.</text:p>
      <text:p text:style-name="Horizontal_20_Line"/>
      <text:h text:style-name="Heading_20_2" text:outline-level="2">Step 1 — Create Base Abstract Class</text:h>
      <text:p text:style-name="Text_20_body">Create:</text:p>
      <text:section text:style-name="Sect1" text:name="Section15">
        <text:p text:style-name="P1"><text:bookmark text:name="code-block-viewer Copy 14"/>DataStream</text:p>
      </text:section>
      <text:p text:style-name="Text_20_body">Inherit from:</text:p>
      <text:section text:style-name="Sect1" text:name="Section16">
        <text:p text:style-name="P1"><text:bookmark text:name="code-block-viewer Copy 15"/>ABC</text:p>
      </text:section>
      <text:p text:style-name="Horizontal_20_Line"/>
      <text:h text:style-name="Heading_20_2" text:outline-level="2">Step 2 — Required Methods</text:h>
      <text:h text:style-name="Heading_20_3" text:outline-level="3">Abstract</text:h>
      <text:section text:style-name="Sect1" text:name="Section17">
        <text:p text:style-name="P1"><text:bookmark text:name="code-block-viewer Copy 16"/>process_batch(self, data_batch: List[Any]) -&gt; str</text:p>
      </text:section>
      <text:p text:style-name="Horizontal_20_Line"/>
      <text:h text:style-name="Heading_20_3" text:outline-level="3">Default implementations</text:h>
      <text:section text:style-name="Sect1" text:name="Section18">
        <text:p text:style-name="P1"><text:bookmark text:name="code-block-viewer Copy 17"/>filter_data(self, data_batch: List[Any], criteria: Optional[str] = None) -&gt; List[Any]</text:p>
        <text:p text:style-name="Preformatted_20_Text">get_stats(self) -&gt; Dict[str, Union[str, int, float]]</text:p>
      </text:section>
      <text:p text:style-name="Text_20_body">These can be overridden by subclasses.</text:p>
      <text:p text:style-name="Horizontal_20_Line"/>
      <text:h text:style-name="Heading_20_2" text:outline-level="2">Step 3 — Create Stream Classes</text:h>
      <text:p text:style-name="Text_20_body">Each inherits from <text:span text:style-name="Source_20_Text">DataStream</text:span>.</text:p>
      <text:p text:style-name="Text_20_body">Classes:</text:p>
      <text:section text:style-name="Sect1" text:name="Section19">
        <text:p text:style-name="P1"><text:bookmark text:name="code-block-viewer Copy 18"/>SensorStream</text:p>
        <text:p text:style-name="Preformatted_20_Text">TransactionStream</text:p>
        <text:p text:style-name="Preformatted_20_Text">EventStream</text:p>
      </text:section>
      <text:p text:style-name="Text_20_body">Each must accept:</text:p>
      <text:section text:style-name="Sect1" text:name="Section20">
        <text:p text:style-name="P1"><text:bookmark text:name="code-block-viewer Copy 19"/>stream_id</text:p>
      </text:section>
      <text:p text:style-name="Text_20_body">Example:</text:p>
      <text:section text:style-name="Sect1" text:name="Section21">
        <text:p text:style-name="P1"><text:bookmark text:name="code-block-viewer Copy 20"/><text:soft-page-break/>SensorStream("SENSOR_001")</text:p>
      </text:section>
      <text:p text:style-name="Horizontal_20_Line"/>
      <text:h text:style-name="Heading_20_2" text:outline-level="2">Step 4 — Implement <text:span text:style-name="Source_20_Text">process_batch()</text:span></text:h>
      <text:p text:style-name="Text_20_body">Each stream handles <text:span text:style-name="Strong_20_Emphasis">different data types</text:span>.</text:p>
      <text:p text:style-name="Text_20_body">Example ideas:</text:p>
      <text:h text:style-name="Heading_20_3" text:outline-level="3">SensorStream</text:h>
      <text:p text:style-name="Text_20_body">Input example:</text:p>
      <text:section text:style-name="Sect1" text:name="Section22">
        <text:p text:style-name="P1"><text:bookmark text:name="code-block-viewer Copy 21"/>[22.5, 23.1, 21.9]</text:p>
      </text:section>
      <text:p text:style-name="Text_20_body">Behavior:</text:p>
      <text:section text:style-name="Sect1" text:name="Section23">
        <text:p text:style-name="P1"><text:bookmark text:name="code-block-viewer Copy 22"/>count readings</text:p>
        <text:p text:style-name="Preformatted_20_Text">calculate average</text:p>
      </text:section>
      <text:p text:style-name="Horizontal_20_Line"/>
      <text:h text:style-name="Heading_20_3" text:outline-level="3">TransactionStream</text:h>
      <text:p text:style-name="Text_20_body">Input example:</text:p>
      <text:section text:style-name="Sect1" text:name="Section24">
        <text:p text:style-name="P1"><text:bookmark text:name="code-block-viewer Copy 23"/>["buy:100", "sell:150"]</text:p>
      </text:section>
      <text:p text:style-name="Text_20_body">Behavior:</text:p>
      <text:section text:style-name="Sect1" text:name="Section25">
        <text:p text:style-name="P1"><text:bookmark text:name="code-block-viewer Copy 24"/>count operations</text:p>
        <text:p text:style-name="Preformatted_20_Text">calculate net flow</text:p>
      </text:section>
      <text:p text:style-name="Horizontal_20_Line"/>
      <text:h text:style-name="Heading_20_3" text:outline-level="3">EventStream</text:h>
      <text:p text:style-name="Text_20_body">Input example:</text:p>
      <text:section text:style-name="Sect1" text:name="Section26">
        <text:p text:style-name="P1"><text:bookmark text:name="code-block-viewer Copy 25"/>["login", "error", "logout"]</text:p>
      </text:section>
      <text:p text:style-name="Text_20_body">Behavior:</text:p>
      <text:section text:style-name="Sect1" text:name="Section27">
        <text:p text:style-name="P1"><text:bookmark text:name="code-block-viewer Copy 26"/>count events</text:p>
        <text:p text:style-name="Preformatted_20_Text">detect errors</text:p>
      </text:section>
      <text:p text:style-name="Horizontal_20_Line"/>
      <text:h text:style-name="Heading_20_2" text:outline-level="2">Step 5 — Create a Manager Class</text:h>
      <text:p text:style-name="Text_20_body">Create:</text:p>
      <text:section text:style-name="Sect1" text:name="Section28">
        <text:p text:style-name="P1"><text:bookmark text:name="code-block-viewer Copy 27"/>StreamProcessor</text:p>
      </text:section>
      <text:p text:style-name="Text_20_body">This class manages multiple streams.</text:p>
      <text:p text:style-name="Text_20_body">Example:</text:p>
      <text:section text:style-name="Sect1" text:name="Section29">
        <text:p text:style-name="P1"><text:bookmark text:name="code-block-viewer Copy 28"/>self.streams = []</text:p>
      </text:section>
      <text:p text:style-name="Text_20_body">Add streams and process them polymorphically.</text:p>
      <text:p text:style-name="Text_20_body">Example:</text:p>
      <text:section text:style-name="Sect1" text:name="Section30">
        <text:p text:style-name="P1"><text:bookmark text:name="code-block-viewer Copy 29"/>for stream in streams:</text:p>
        <text:p text:style-name="Preformatted_20_Text"><text:s text:c="4"/>stream.process_batch(data)</text:p>
      </text:section>
      <text:p text:style-name="Horizontal_20_Line"/>
      <text:h text:style-name="Heading_20_2" text:outline-level="2"><text:soft-page-break/>Step 6 — Demonstrate Mixed Processing</text:h>
      <text:p text:style-name="Text_20_body">Show that the manager can handle different stream types:</text:p>
      <text:section text:style-name="Sect1" text:name="Section31">
        <text:p text:style-name="P1"><text:bookmark text:name="code-block-viewer Copy 30"/>SensorStream</text:p>
        <text:p text:style-name="Preformatted_20_Text">TransactionStream</text:p>
        <text:p text:style-name="Preformatted_20_Text">EventStream</text:p>
      </text:section>
      <text:p text:style-name="Text_20_body">All through the <text:span text:style-name="Strong_20_Emphasis">same interface</text:span>.</text:p>
      <text:p text:style-name="Horizontal_20_Line"/>
      <text:h text:style-name="Heading_20_1" text:outline-level="1">Exercise 2 — Plain Requirements</text:h>
      <text:p text:style-name="Text_20_body">Directory:</text:p>
      <text:section text:style-name="Sect1" text:name="Section32">
        <text:p text:style-name="P1"><text:bookmark text:name="code-block-viewer Copy 31"/>ex2/</text:p>
        <text:p text:style-name="Preformatted_20_Text">nexus_pipeline.py</text:p>
      </text:section>
      <text:p text:style-name="Horizontal_20_Line"/>
      <text:h text:style-name="Heading_20_2" text:outline-level="2">Goal</text:h>
      <text:p text:style-name="Text_20_body">Build a <text:span text:style-name="Strong_20_Emphasis">processing pipeline system</text:span> with:</text:p>
      <text:list text:style-name="L1">
        <text:list-item>
          <text:p text:style-name="P2">stages</text:p>
        </text:list-item>
        <text:list-item>
          <text:p text:style-name="P2">pipelines</text:p>
        </text:list-item>
        <text:list-item>
          <text:p text:style-name="P2">adapters</text:p>
        </text:list-item>
        <text:list-item>
          <text:p text:style-name="P2">manager</text:p>
        </text:list-item>
      </text:list>
      <text:p text:style-name="Text_20_body">This demonstrates <text:span text:style-name="Strong_20_Emphasis">advanced polymorphism and architecture</text:span>.</text:p>
      <text:p text:style-name="Horizontal_20_Line"/>
      <text:h text:style-name="Heading_20_1" text:outline-level="1">Step 1 — Create Stage Interface Using Protocol</text:h>
      <text:p text:style-name="Text_20_body">Import:</text:p>
      <text:section text:style-name="Sect1" text:name="Section33">
        <text:p text:style-name="P1"><text:bookmark text:name="code-block-viewer Copy 32"/>from typing import Protocol</text:p>
      </text:section>
      <text:p text:style-name="Text_20_body">Define:</text:p>
      <text:section text:style-name="Sect1" text:name="Section34">
        <text:p text:style-name="P1"><text:bookmark text:name="code-block-viewer Copy 33"/>ProcessingStage</text:p>
      </text:section>
      <text:p text:style-name="Text_20_body">Required method:</text:p>
      <text:section text:style-name="Sect1" text:name="Section35">
        <text:p text:style-name="P1"><text:bookmark text:name="code-block-viewer Copy 34"/>process(self, data: Any) -&gt; Any</text:p>
      </text:section>
      <text:p text:style-name="Text_20_body">This means <text:span text:style-name="Strong_20_Emphasis">any class with </text:span><text:span text:style-name="Strong_20_Emphasis"><text:span text:style-name="Source_20_Text">process()</text:span></text:span><text:span text:style-name="Strong_20_Emphasis"> can be a stage</text:span>.</text:p>
      <text:p text:style-name="Horizontal_20_Line"/>
      <text:h text:style-name="Heading_20_1" text:outline-level="1">Step 2 — Create Stage Classes</text:h>
      <text:p text:style-name="Text_20_body">Create classes:</text:p>
      <text:section text:style-name="Sect1" text:name="Section36">
        <text:p text:style-name="P1"><text:bookmark text:name="code-block-viewer Copy 35"/><text:soft-page-break/>InputStage</text:p>
        <text:p text:style-name="Preformatted_20_Text">TransformStage</text:p>
        <text:p text:style-name="Preformatted_20_Text">OutputStage</text:p>
      </text:section>
      <text:p text:style-name="Text_20_body">They <text:span text:style-name="Strong_20_Emphasis">do NOT inherit</text:span> from anything.</text:p>
      <text:p text:style-name="Text_20_body">They simply implement:</text:p>
      <text:section text:style-name="Sect1" text:name="Section37">
        <text:p text:style-name="P1"><text:bookmark text:name="code-block-viewer Copy 36"/>process(self, data)</text:p>
      </text:section>
      <text:p text:style-name="Text_20_body">Example behavior:</text:p>
      <text:h text:style-name="Heading_20_3" text:outline-level="3">InputStage</text:h>
      <text:section text:style-name="Sect1" text:name="Section38">
        <text:p text:style-name="P1"><text:bookmark text:name="code-block-viewer Copy 37"/>validate or clean input</text:p>
      </text:section>
      <text:p text:style-name="Horizontal_20_Line"/>
      <text:h text:style-name="Heading_20_3" text:outline-level="3">TransformStage</text:h>
      <text:section text:style-name="Sect1" text:name="Section39">
        <text:p text:style-name="P1"><text:bookmark text:name="code-block-viewer Copy 38"/>modify or enrich data</text:p>
      </text:section>
      <text:p text:style-name="Horizontal_20_Line"/>
      <text:h text:style-name="Heading_20_3" text:outline-level="3">OutputStage</text:h>
      <text:section text:style-name="Sect1" text:name="Section40">
        <text:p text:style-name="P1"><text:bookmark text:name="code-block-viewer Copy 39"/>format result</text:p>
      </text:section>
      <text:p text:style-name="Horizontal_20_Line"/>
      <text:h text:style-name="Heading_20_1" text:outline-level="1">Step 3 — Create Abstract Pipeline</text:h>
      <text:p text:style-name="Text_20_body">Create class:</text:p>
      <text:section text:style-name="Sect1" text:name="Section41">
        <text:p text:style-name="P1"><text:bookmark text:name="code-block-viewer Copy 40"/>ProcessingPipeline</text:p>
      </text:section>
      <text:p text:style-name="Text_20_body">Inherit from:</text:p>
      <text:section text:style-name="Sect1" text:name="Section42">
        <text:p text:style-name="P1"><text:bookmark text:name="code-block-viewer Copy 41"/>ABC</text:p>
      </text:section>
      <text:p text:style-name="Text_20_body">Responsibilities:</text:p>
      <text:section text:style-name="Sect1" text:name="Section43">
        <text:p text:style-name="P1"><text:bookmark text:name="code-block-viewer Copy 42"/>store pipeline stages</text:p>
        <text:p text:style-name="Preformatted_20_Text">execute stages in order</text:p>
      </text:section>
      <text:p text:style-name="Text_20_body">Example structure:</text:p>
      <text:section text:style-name="Sect1" text:name="Section44">
        <text:p text:style-name="P1"><text:bookmark text:name="code-block-viewer Copy 43"/>self.stages: List[ProcessingStage]</text:p>
      </text:section>
      <text:p text:style-name="Horizontal_20_Line"/>
      <text:h text:style-name="Heading_20_1" text:outline-level="1">Step 4 — Pipeline Execution</text:h>
      <text:p text:style-name="Text_20_body">Pipeline runs data through all stages:</text:p>
      <text:section text:style-name="Sect1" text:name="Section45">
        <text:p text:style-name="P1"><text:bookmark text:name="code-block-viewer Copy 44"/>for stage in self.stages:</text:p>
        <text:p text:style-name="Preformatted_20_Text"><text:s text:c="4"/>data = stage.process(data)</text:p>
      </text:section>
      <text:p text:style-name="Horizontal_20_Line"/>
      <text:h text:style-name="Heading_20_1" text:outline-level="1">Step 5 — Create Adapter Pipelines</text:h>
      <text:p text:style-name="Text_20_body">These inherit from <text:span text:style-name="Source_20_Text">ProcessingPipeline</text:span>.</text:p>
      <text:p text:style-name="Text_20_body">Classes:</text:p>
      <text:section text:style-name="Sect1" text:name="Section46">
        <text:p text:style-name="P1"><text:bookmark text:name="code-block-viewer Copy 45"/><text:soft-page-break/>JSONAdapter</text:p>
        <text:p text:style-name="Preformatted_20_Text">CSVAdapter</text:p>
        <text:p text:style-name="Preformatted_20_Text">StreamAdapter</text:p>
      </text:section>
      <text:p text:style-name="Text_20_body">Each must accept:</text:p>
      <text:section text:style-name="Sect1" text:name="Section47">
        <text:p text:style-name="P1"><text:bookmark text:name="code-block-viewer Copy 46"/>pipeline_id</text:p>
      </text:section>
      <text:p text:style-name="Text_20_body">Each overrides:</text:p>
      <text:section text:style-name="Sect1" text:name="Section48">
        <text:p text:style-name="P1"><text:bookmark text:name="code-block-viewer Copy 47"/>process(self, data)</text:p>
      </text:section>
      <text:p text:style-name="Text_20_body">Purpose:</text:p>
      <text:section text:style-name="Sect1" text:name="Section49">
        <text:p text:style-name="P1"><text:bookmark text:name="code-block-viewer Copy 48"/>handle different input formats</text:p>
      </text:section>
      <text:p text:style-name="Text_20_body">Example:</text:p>
      <text:h text:style-name="Heading_20_3" text:outline-level="3">JSONAdapter</text:h>
      <text:section text:style-name="Sect1" text:name="Section50">
        <text:p text:style-name="P1"><text:bookmark text:name="code-block-viewer Copy 49"/>parse JSON-like data</text:p>
      </text:section>
      <text:p text:style-name="Horizontal_20_Line"/>
      <text:h text:style-name="Heading_20_3" text:outline-level="3">CSVAdapter</text:h>
      <text:section text:style-name="Sect1" text:name="Section51">
        <text:p text:style-name="P1"><text:bookmark text:name="code-block-viewer Copy 50"/>split CSV rows</text:p>
      </text:section>
      <text:p text:style-name="Horizontal_20_Line"/>
      <text:h text:style-name="Heading_20_3" text:outline-level="3">StreamAdapter</text:h>
      <text:section text:style-name="Sect1" text:name="Section52">
        <text:p text:style-name="P1"><text:bookmark text:name="code-block-viewer Copy 51"/>handle streaming data</text:p>
      </text:section>
      <text:p text:style-name="Horizontal_20_Line"/>
      <text:h text:style-name="Heading_20_1" text:outline-level="1">Step 6 — Create NexusManager</text:h>
      <text:p text:style-name="Text_20_body">Class:</text:p>
      <text:section text:style-name="Sect1" text:name="Section53">
        <text:p text:style-name="P1"><text:bookmark text:name="code-block-viewer Copy 52"/>NexusManager</text:p>
      </text:section>
      <text:p text:style-name="Text_20_body">Responsibilities:</text:p>
      <text:section text:style-name="Sect1" text:name="Section54">
        <text:p text:style-name="P1"><text:bookmark text:name="code-block-viewer Copy 53"/>store multiple pipelines</text:p>
        <text:p text:style-name="Preformatted_20_Text">run pipelines</text:p>
        <text:p text:style-name="Preformatted_20_Text">monitor results</text:p>
      </text:section>
      <text:p text:style-name="Text_20_body">Example structure:</text:p>
      <text:section text:style-name="Sect1" text:name="Section55">
        <text:p text:style-name="P1"><text:bookmark text:name="code-block-viewer Copy 54"/>self.pipelines = []</text:p>
      </text:section>
      <text:p text:style-name="Horizontal_20_Line"/>
      <text:h text:style-name="Heading_20_1" text:outline-level="1">Step 7 — Demonstrate Pipeline Chaining</text:h>
      <text:p text:style-name="Text_20_body">Example idea:</text:p>
      <text:section text:style-name="Sect1" text:name="Section56">
        <text:p text:style-name="P1"><text:bookmark text:name="code-block-viewer Copy 55"/>pipelineA -&gt; pipelineB -&gt; pipelineC</text:p>
      </text:section>
      <text:p text:style-name="Text_20_body">Output of one becomes input to next.</text:p>
      <text:p text:style-name="Text_20_body">Example:</text:p>
      <text:section text:style-name="Sect1" text:name="Section57">
        <text:p text:style-name="P1"><text:bookmark text:name="code-block-viewer Copy 56"/>data = pipelineA.process(data)</text:p>
        <text:p text:style-name="Preformatted_20_Text">data = pipelineB.process(data)</text:p>
      </text:section>
      <text:p text:style-name="Horizontal_20_Line"/>
      <text:h text:style-name="Heading_20_1" text:outline-level="1"><text:soft-page-break/>Step 8 — Add Error Handling</text:h>
      <text:p text:style-name="Text_20_body">Use:</text:p>
      <text:section text:style-name="Sect1" text:name="Section58">
        <text:p text:style-name="P1"><text:bookmark text:name="code-block-viewer Copy 57"/>try / except</text:p>
      </text:section>
      <text:p text:style-name="Text_20_body">If a stage fails:</text:p>
      <text:section text:style-name="Sect1" text:name="Section59">
        <text:p text:style-name="P1"><text:bookmark text:name="code-block-viewer Copy 58"/>handle error</text:p>
        <text:p text:style-name="Preformatted_20_Text">recover</text:p>
        <text:p text:style-name="Preformatted_20_Text">continue</text:p>
      </text:section>
      <text:p text:style-name="Horizontal_20_Line"/>
      <text:h text:style-name="Heading_20_1" text:outline-level="1">The Real Concepts Each Exercise Tes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xercise</text:p>
            </table:table-cell>
            <table:table-cell table:style-name="Table1.A1" office:value-type="string">
              <text:p text:style-name="Table_20_Heading">Main Concept</text:p>
            </table:table-cell>
          </table:table-row>
        </table:table-header-rows>
        <table:table-row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inheritance + method overriding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polymorphism + manager class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architecture + pipelines + protocol</text:p>
          </table:table-cell>
        </table:table-row>
      </table:table>
      <text:p text:style-name="Horizontal_20_Line"/>
      <text:p text:style-name="Text_20_body">✅ <text:span text:style-name="Strong_20_Emphasis">Final advice</text:span></text:p>
      <text:p text:style-name="Text_20_body">Treat the project like this:</text:p>
      <text:section text:style-name="Sect1" text:name="Section60">
        <text:p text:style-name="P1"><text:bookmark text:name="code-block-viewer Copy 59"/>Exercise 0 → basic OOP</text:p>
        <text:p text:style-name="Preformatted_20_Text">Exercise 1 → polymorphic system</text:p>
        <text:p text:style-name="Preformatted_20_Text">Exercise 2 → architecture design</text:p>
      </text:section>
      <text:p text:style-name="Text_20_body">Ignore the story entirely.</text:p>
      <text:p text:style-name="Horizontal_20_Line"/>
      <text:p text:style-name="Text_20_body">If you'd like, I can also show you <text:span text:style-name="Strong_20_Emphasis">the minimal class diagrams for all three exercises</text:span>, which makes the implementation almost trivial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7:28:07.112593046</meta:creation-date>
    <dc:date>2026-03-13T17:28:42.172029009</dc:date>
    <meta:editing-duration>PT35S</meta:editing-duration>
    <meta:editing-cycles>1</meta:editing-cycles>
    <meta:document-statistic meta:table-count="1" meta:image-count="0" meta:object-count="0" meta:page-count="8" meta:paragraph-count="233" meta:word-count="722" meta:character-count="5211" meta:non-whitespace-character-count="4680"/>
    <meta:generator>LibreOffice/25.2.7.2$Linux_X86_64 LibreOffice_project/520$Build-2</meta:generator>
  </office:meta>
</office:document-meta>
</file>