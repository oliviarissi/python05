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es — there are several <text:span text:style-name="Strong_20_Emphasis">practical tips</text:span> that will make these exercises <text:span text:style-name="Emphasis">much easier</text:span>, especially since the assignment text is intentionally vague. I’ll focus on <text:span text:style-name="Strong_20_Emphasis">how to approach the work</text:span>, not just the concepts.</text:p>
      <text:p text:style-name="Horizontal_20_Line"/>
      <text:h text:style-name="Heading_20_1" text:outline-level="1">1. Translate the Assignment Into Plain Requirements</text:h>
      <text:p text:style-name="Text_20_body">Before coding, rewrite the task in <text:span text:style-name="Strong_20_Emphasis">simple technical terms</text:span>.</text:p>
      <text:p text:style-name="Text_20_body">Example for <text:span text:style-name="Strong_20_Emphasis">Exercise 0</text:span>:</text:p>
      <text:p text:style-name="Text_20_body">Instead of the story, the real task is:</text:p>
      <text:section text:style-name="Sect1" text:name="code-block-viewer">
        <text:p text:style-name="P1">Create abstract class DataProcessor</text:p>
        <text:p text:style-name="Preformatted_20_Text">Methods:</text:p>
        <text:p text:style-name="Preformatted_20_Text">- process(data) -&gt; str</text:p>
        <text:p text:style-name="Preformatted_20_Text">- validate(data) -&gt; bool</text:p>
        <text:p text:style-name="Preformatted_20_Text">- format_output(result) -&gt; str (default implementation)</text:p>
        <text:p text:style-name="Preformatted_20_Text">Create subclasses:</text:p>
        <text:p text:style-name="Preformatted_20_Text">- NumericProcessor</text:p>
        <text:p text:style-name="Preformatted_20_Text">- TextProcessor</text:p>
        <text:p text:style-name="Preformatted_20_Text">- LogProcessor</text:p>
      </text:section>
      <text:p text:style-name="Text_20_body">Then:</text:p>
      <text:section text:style-name="Sect1" text:name="Section1">
        <text:p text:style-name="P1"><text:bookmark text:name="code-block-viewer"/>Each subclass overrides:</text:p>
        <text:p text:style-name="Preformatted_20_Text">- process()</text:p>
        <text:p text:style-name="Preformatted_20_Text">- validate()</text:p>
      </text:section>
      <text:p text:style-name="Text_20_body">And finally:</text:p>
      <text:section text:style-name="Sect1" text:name="Section2">
        <text:p text:style-name="P1"><text:bookmark text:name="code-block-viewer Copy 1"/>Demonstrate polymorphism with a list of processors</text:p>
      </text:section>
      <text:p text:style-name="Text_20_body">Doing this <text:span text:style-name="Strong_20_Emphasis">removes 90% of the confusion</text:span>.</text:p>
      <text:p text:style-name="Horizontal_20_Line"/>
      <text:h text:style-name="Heading_20_1" text:outline-level="1">2. Always Design the Class Structure First</text:h>
      <text:p text:style-name="Text_20_body">Before writing code, sketch the structure.</text:p>
      <text:p text:style-name="Text_20_body">Example:</text:p>
      <text:section text:style-name="Sect1" text:name="Section3">
        <text:p text:style-name="P1"><text:bookmark text:name="code-block-viewer Copy 2"/>DataProcessor (ABC)</text:p>
        <text:p text:style-name="Preformatted_20_Text"><text:s/>├─ NumericProcessor</text:p>
        <text:p text:style-name="Preformatted_20_Text"><text:s/>├─ TextProcessor</text:p>
        <text:p text:style-name="Preformatted_20_Text"><text:s/>└─ LogProcessor</text:p>
      </text:section>
      <text:p text:style-name="Text_20_body">Methods:</text:p>
      <text:section text:style-name="Sect1" text:name="Section4">
        <text:p text:style-name="P1"><text:bookmark text:name="code-block-viewer Copy 3"/>process()</text:p>
        <text:p text:style-name="Preformatted_20_Text">validate()</text:p>
        <text:p text:style-name="Preformatted_20_Text">format_output()</text:p>
      </text:section>
      <text:p text:style-name="Text_20_body">This prevents messy code later.</text:p>
      <text:p text:style-name="Horizontal_20_Line"/>
      <text:h text:style-name="Heading_20_1" text:outline-level="1"><text:soft-page-break/>3. Implement the Base Class First</text:h>
      <text:p text:style-name="Text_20_body">Always start with the <text:span text:style-name="Strong_20_Emphasis">abstract base class</text:span>.</text:p>
      <text:p text:style-name="Text_20_body">Example structure:</text:p>
      <text:section text:style-name="Sect1" text:name="Section5">
        <text:p text:style-name="P1"><text:bookmark text:name="code-block-viewer Copy 4"/>from abc import ABC, abstractmethod</text:p>
        <text:p text:style-name="Preformatted_20_Text">from typing import Any</text:p>
        <text:p text:style-name="Preformatted_20_Text">class DataProcessor(ABC):</text:p>
        <text:p text:style-name="Preformatted_20_Text"><text:s text:c="4"/>@abstractmethod</text:p>
        <text:p text:style-name="Preformatted_20_Text"><text:s text:c="4"/>def process(self, data: Any) -&gt; str:</text:p>
        <text:p text:style-name="Preformatted_20_Text"><text:s text:c="8"/>pass</text:p>
        <text:p text:style-name="Preformatted_20_Text"><text:s text:c="4"/>@abstractmethod</text:p>
        <text:p text:style-name="Preformatted_20_Text"><text:s text:c="4"/>def validate(self, data: Any) -&gt; bool:</text:p>
        <text:p text:style-name="Preformatted_20_Text"><text:s text:c="8"/>pass</text:p>
        <text:p text:style-name="Preformatted_20_Text"><text:s text:c="4"/>def format_output(self, result: str) -&gt; str:</text:p>
        <text:p text:style-name="Preformatted_20_Text"><text:s text:c="8"/>return f"Output: {result}"</text:p>
      </text:section>
      <text:p text:style-name="Text_20_body">Once this exists, subclasses become simple.</text:p>
      <text:p text:style-name="Horizontal_20_Line"/>
      <text:h text:style-name="Heading_20_1" text:outline-level="1">4. Implement the Simplest Behavior First</text:h>
      <text:p text:style-name="Text_20_body">Don't try to perfectly match the example output immediately.</text:p>
      <text:p text:style-name="Text_20_body">Start with something simple.</text:p>
      <text:p text:style-name="Text_20_body">Example:</text:p>
      <text:section text:style-name="Sect1" text:name="Section6">
        <text:p text:style-name="P1"><text:bookmark text:name="code-block-viewer Copy 5"/>class NumericProcessor(DataProcessor):</text:p>
        <text:p text:style-name="Preformatted_20_Text"><text:s text:c="4"/>def validate(self, data: Any) -&gt; bool:</text:p>
        <text:p text:style-name="Preformatted_20_Text"><text:s text:c="8"/>return isinstance(data, list)</text:p>
        <text:p text:style-name="Preformatted_20_Text"><text:s text:c="4"/>def process(self, data: Any) -&gt; str:</text:p>
        <text:p text:style-name="Preformatted_20_Text"><text:s text:c="8"/>return "processed numbers"</text:p>
      </text:section>
      <text:p text:style-name="Text_20_body">Make it <text:span text:style-name="Strong_20_Emphasis">work first</text:span>, then improve.</text:p>
      <text:p text:style-name="Horizontal_20_Line"/>
      <text:h text:style-name="Heading_20_1" text:outline-level="1">5. Use the Assignment Example Output as a Guide</text:h>
      <text:p text:style-name="Text_20_body">They are <text:span text:style-name="Strong_20_Emphasis">not strict requirements</text:span>.</text:p>
      <text:p text:style-name="Text_20_body">They show <text:span text:style-name="Strong_20_Emphasis">rough behavior</text:span>, not exact implementation.</text:p>
      <text:p text:style-name="Text_20_body">Example:</text:p>
      <text:section text:style-name="Sect1" text:name="Section7">
        <text:p text:style-name="P1"><text:bookmark text:name="code-block-viewer Copy 6"/>Processed 5 numeric values, sum=15</text:p>
      </text:section>
      <text:p text:style-name="Text_20_body">You just need logic like:</text:p>
      <text:section text:style-name="Sect1" text:name="Section8">
        <text:p text:style-name="P1"><text:bookmark text:name="code-block-viewer Copy 7"/>sum(data)</text:p>
        <text:p text:style-name="Preformatted_20_Text">len(data)</text:p>
      </text:section>
      <text:p text:style-name="Horizontal_20_Line"/>
      <text:h text:style-name="Heading_20_1" text:outline-level="1"><text:soft-page-break/>6. Use Small Tests While Coding</text:h>
      <text:p text:style-name="Text_20_body">Instead of writing everything at once.</text:p>
      <text:p text:style-name="Text_20_body">Test quickly:</text:p>
      <text:section text:style-name="Sect1" text:name="Section9">
        <text:p text:style-name="P1"><text:bookmark text:name="code-block-viewer Copy 8"/>p = NumericProcessor()</text:p>
        <text:p text:style-name="Preformatted_20_Text">print(p.process([1,2,3]))</text:p>
      </text:section>
      <text:p text:style-name="Text_20_body">This saves huge debugging time.</text:p>
      <text:p text:style-name="Horizontal_20_Line"/>
      <text:h text:style-name="Heading_20_1" text:outline-level="1">7. Remember the Key Idea of the Project</text:h>
      <text:p text:style-name="Text_20_body">The <text:span text:style-name="Strong_20_Emphasis">entire module is about one concept</text:span>:</text:p>
      <text:section text:style-name="Sect1" text:name="Section10">
        <text:p text:style-name="P1"><text:bookmark text:name="code-block-viewer Copy 9"/>Same interface</text:p>
        <text:p text:style-name="Preformatted_20_Text">Different behavior</text:p>
      </text:section>
      <text:p text:style-name="Text_20_body">Example:</text:p>
      <text:section text:style-name="Sect1" text:name="Section11">
        <text:p text:style-name="P1"><text:bookmark text:name="code-block-viewer Copy 10"/>processor.process(data)</text:p>
      </text:section>
      <text:p text:style-name="Text_20_body">Different processors do different things.</text:p>
      <text:section text:style-name="Sect1" text:name="Section12">
        <text:p text:style-name="P1"><text:bookmark text:name="code-block-viewer Copy 11"/>NumericProcessor → sums numbers</text:p>
        <text:p text:style-name="Preformatted_20_Text">TextProcessor → counts words</text:p>
        <text:p text:style-name="Preformatted_20_Text">LogProcessor → parses log level</text:p>
      </text:section>
      <text:p text:style-name="Text_20_body">But the call is always the same:</text:p>
      <text:section text:style-name="Sect1" text:name="Section13">
        <text:p text:style-name="P1"><text:bookmark text:name="code-block-viewer Copy 12"/>processor.process(data)</text:p>
      </text:section>
      <text:p text:style-name="Text_20_body">That’s <text:span text:style-name="Strong_20_Emphasis">polymorphism</text:span>.</text:p>
      <text:p text:style-name="Horizontal_20_Line"/>
      <text:h text:style-name="Heading_20_1" text:outline-level="1">8. For Exercise 1 and 2: Think "Manager + Objects"</text:h>
      <text:p text:style-name="Text_20_body">Many students get confused here.</text:p>
      <text:p text:style-name="Text_20_body">Pattern used:</text:p>
      <text:section text:style-name="Sect1" text:name="Section14">
        <text:p text:style-name="P1"><text:bookmark text:name="code-block-viewer Copy 13"/>Manager class</text:p>
        <text:p text:style-name="Preformatted_20_Text"><text:s text:c="3"/>↓</text:p>
        <text:p text:style-name="Preformatted_20_Text">List of objects</text:p>
        <text:p text:style-name="Preformatted_20_Text"><text:s text:c="3"/>↓</text:p>
        <text:p text:style-name="Preformatted_20_Text">Loop through them</text:p>
      </text:section>
      <text:p text:style-name="Text_20_body">Example idea:</text:p>
      <text:section text:style-name="Sect1" text:name="Section15">
        <text:p text:style-name="P1"><text:bookmark text:name="code-block-viewer Copy 14"/>for stream in streams:</text:p>
        <text:p text:style-name="Preformatted_20_Text"><text:s text:c="4"/>result = stream.process_batch(data)</text:p>
      </text:section>
      <text:p text:style-name="Text_20_body">The manager <text:span text:style-name="Strong_20_Emphasis">doesn't care about the specific class</text:span>.</text:p>
      <text:p text:style-name="Horizontal_20_Line"/>
      <text:h text:style-name="Heading_20_1" text:outline-level="1"><text:soft-page-break/>9. Do Not Overcomplicate</text:h>
      <text:p text:style-name="Text_20_body">Students often over-engineer.</text:p>
      <text:p text:style-name="Text_20_body">Your teachers expect something closer to:</text:p>
      <text:list text:style-name="L1">
        <text:list-item>
          <text:p text:style-name="P2">simple logic</text:p>
        </text:list-item>
        <text:list-item>
          <text:p text:style-name="P2">clear inheritance</text:p>
        </text:list-item>
        <text:list-item>
          <text:p text:style-name="P2">correct method overriding</text:p>
        </text:list-item>
      </text:list>
      <text:p text:style-name="Text_20_body">Not enterprise software.</text:p>
      <text:p text:style-name="Horizontal_20_Line"/>
      <text:h text:style-name="Heading_20_1" text:outline-level="1">10. Keep Your Code Very Structured</text:h>
      <text:p text:style-name="Text_20_body">Use this order in every file:</text:p>
      <text:section text:style-name="Sect1" text:name="Section16">
        <text:p text:style-name="P1"><text:bookmark text:name="code-block-viewer Copy 15"/>imports</text:p>
        <text:p text:style-name="Preformatted_20_Text">base classes</text:p>
        <text:p text:style-name="Preformatted_20_Text">child classes</text:p>
        <text:p text:style-name="Preformatted_20_Text">manager class</text:p>
        <text:p text:style-name="Preformatted_20_Text">main test block</text:p>
      </text:section>
      <text:p text:style-name="Text_20_body">Example:</text:p>
      <text:section text:style-name="Sect1" text:name="Section17">
        <text:p text:style-name="P1"><text:bookmark text:name="code-block-viewer Copy 16"/>if __name__ == "__main__":</text:p>
      </text:section>
      <text:p text:style-name="Text_20_body">for demonstration code.</text:p>
      <text:p text:style-name="Horizontal_20_Line"/>
      <text:h text:style-name="Heading_20_1" text:outline-level="1">11. Common Mistakes Students Make</text:h>
      <text:h text:style-name="Heading_20_3" text:outline-level="3">Forgetting <text:span text:style-name="Source_20_Text">@abstractmethod</text:span></text:h>
      <text:p text:style-name="Text_20_body">Example mistake:</text:p>
      <text:section text:style-name="Sect1" text:name="Section18">
        <text:p text:style-name="P1"><text:bookmark text:name="code-block-viewer Copy 17"/>process() defined but not abstract</text:p>
      </text:section>
      <text:p text:style-name="Horizontal_20_Line"/>
      <text:h text:style-name="Heading_20_3" text:outline-level="3">Wrong method signatures</text:h>
      <text:p text:style-name="Text_20_body">If parent says:</text:p>
      <text:section text:style-name="Sect1" text:name="Section19">
        <text:p text:style-name="P1"><text:bookmark text:name="code-block-viewer Copy 18"/>process(self, data: Any) -&gt; str</text:p>
      </text:section>
      <text:p text:style-name="Text_20_body">Child must match <text:span text:style-name="Strong_20_Emphasis">exactly</text:span>.</text:p>
      <text:p text:style-name="Horizontal_20_Line"/>
      <text:h text:style-name="Heading_20_3" text:outline-level="3">Not using inheritance</text:h>
      <text:p text:style-name="Text_20_body">Some students create completely separate classes.</text:p>
      <text:p text:style-name="Text_20_body">They must do:</text:p>
      <text:section text:style-name="Sect1" text:name="Section20">
        <text:p text:style-name="P1"><text:bookmark text:name="code-block-viewer Copy 19"/>class NumericProcessor(DataProcessor)</text:p>
      </text:section>
      <text:p text:style-name="Horizontal_20_Line"/>
      <text:h text:style-name="Heading_20_3" text:outline-level="3"><text:soft-page-break/>Overusing <text:span text:style-name="Source_20_Text">isinstance</text:span></text:h>
      <text:p text:style-name="Text_20_body">Only use it <text:span text:style-name="Strong_20_Emphasis">when needed</text:span>, not everywhere.</text:p>
      <text:p text:style-name="Horizontal_20_Line"/>
      <text:h text:style-name="Heading_20_1" text:outline-level="1">12. The Real Skills This Project Teaches</text:h>
      <text:p text:style-name="Text_20_body">Ignore the story — the module is teaching:</text:p>
      <text:list text:style-name="L2">
        <text:list-item>
          <text:p text:style-name="P3"><text:span text:style-name="Strong_20_Emphasis">Inheritance</text:span></text:p>
        </text:list-item>
        <text:list-item>
          <text:p text:style-name="P3"><text:span text:style-name="Strong_20_Emphasis">Method overriding</text:span></text:p>
        </text:list-item>
        <text:list-item>
          <text:p text:style-name="P3"><text:span text:style-name="Strong_20_Emphasis">Polymorphism</text:span></text:p>
        </text:list-item>
        <text:list-item>
          <text:p text:style-name="P3"><text:span text:style-name="Strong_20_Emphasis">Interfaces (ABC / Protocol)</text:span></text:p>
        </text:list-item>
        <text:list-item>
          <text:p text:style-name="P3"><text:span text:style-name="Strong_20_Emphasis">System design with classes</text:span></text:p>
        </text:list-item>
      </text:list>
      <text:p text:style-name="Text_20_body">These are <text:span text:style-name="Strong_20_Emphasis">core OOP concepts</text:span> used in many languages.</text:p>
      <text:p text:style-name="Horizontal_20_Line"/>
      <text:p text:style-name="Text_20_body">✅ <text:span text:style-name="Strong_20_Emphasis">Most important tip</text:span></text:p>
      <text:p text:style-name="Text_20_body">When stuck, ask yourself:</text:p>
      <text:section text:style-name="Sect1" text:name="Section21">
        <text:p text:style-name="P1"><text:bookmark text:name="code-block-viewer Copy 20"/>What is the base class?</text:p>
        <text:p text:style-name="Preformatted_20_Text">What methods must exist?</text:p>
        <text:p text:style-name="Preformatted_20_Text">What behavior changes in subclasses?</text:p>
      </text:section>
      <text:p text:style-name="Text_20_body">That answers <text:span text:style-name="Strong_20_Emphasis">almost every question in this project</text:span>.</text:p>
      <text:p text:style-name="Horizontal_20_Line"/>
      <text:p text:style-name="Text_20_body">If you'd like, I can also show you <text:span text:style-name="Strong_20_Emphasis">a clean step-by-step plan to solve Exercise 0 in about 20–30 minutes</text:span>, which is the fastest way to start the projec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7:25:03.322186296</meta:creation-date>
    <meta:generator>LibreOffice/25.2.7.2$Linux_X86_64 LibreOffice_project/520$Build-2</meta:generator>
    <dc:date>2026-03-13T17:26:06.672766892</dc:date>
    <meta:editing-duration>PT1M4S</meta:editing-duration>
    <meta:editing-cycles>1</meta:editing-cycles>
    <meta:document-statistic meta:table-count="0" meta:image-count="0" meta:object-count="0" meta:page-count="5" meta:paragraph-count="143" meta:word-count="604" meta:character-count="4080" meta:non-whitespace-character-count="3545"/>
  </office:meta>
</office:document-meta>
</file>